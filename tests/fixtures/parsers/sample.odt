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ordmark document processing test.</text:p>
      <text:p text:style-name="Preformatted_20_Text">The quick brown fox jumps over the lazy dog.</text:p>
      <text:p text:style-name="Preformatted_20_Text">Numbers 12345 and symbol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3" meta:word-count="17" meta:character-count="104" meta:non-whitespace-character-count="90"/>
    <meta:generator>LibreOffice/7.3.7.2$Linux_X86_64 LibreOffice_project/30$Build-2</meta:generator>
  </office:meta>
</office:document-meta>
</file>